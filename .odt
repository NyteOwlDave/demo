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14" style:family="text">
      <style:text-properties fo:font-family="monospace" style:text-underline-type="single" style:text-underline-style="solid" fo:color="#0000ff"/>
    </style:style>
    <style:style style:name="c0" style:family="text">
      <style:text-properties fo:font-family="Sans"/>
    </style:style>
    <style:style style:name="p3" style:family="paragraph">
      <style:paragraph-properties fo:margin-top="0pt" fo:margin-bottom="0pt"/>
    </style:style>
    <style:style style:name="c5" style:family="text">
      <style:text-properties fo:font-weight="bold" fo:font-family="Sans"/>
    </style:style>
    <style:style style:name="p4" style:family="paragraph">
      <style:paragraph-properties fo:margin-top="10.5pt" fo:margin-bottom="9pt"/>
    </style:style>
    <style:style style:name="c7" style:family="text">
      <style:text-properties fo:font-family="monospace"/>
    </style:style>
    <style:style style:name="p25" style:family="paragraph">
      <style:paragraph-properties fo:margin-top="12pt" fo:margin-bottom="9pt"/>
    </style:style>
    <style:style style:name="c24" style:family="text">
      <style:text-properties fo:font-weight="bold" fo:font-family="monospace" style:text-underline-type="single" style:text-underline-style="solid" fo:color="#ff00ff"/>
    </style:style>
    <style:style style:name="c27" style:family="text">
      <style:text-properties fo:font-weight="bold" fo:font-family="monospace"/>
    </style:style>
    <style:style style:name="c26" style:family="text">
      <style:text-properties fo:font-weight="bold" fo:font-family="Sans"/>
    </style:style>
    <style:style style:name="p29" style:family="paragraph">
      <style:paragraph-properties/>
    </style:style>
    <style:style style:name="c28" style:family="text">
      <style:text-properties fo:font-weight="bold" fo:font-family="monospace"/>
    </style:style>
    <style:style style:name="p31" style:family="paragraph">
      <style:paragraph-properties fo:margin-bottom="9pt"/>
    </style:style>
    <style:style style:name="p30" style:family="paragraph">
      <style:paragraph-properties fo:margin-top="9pt"/>
    </style:style>
    <style:style style:name="c17" style:family="text">
      <style:text-properties fo:font-family="monospace" style:text-underline-type="single" style:text-underline-style="solid" fo:color="#0000ff"/>
    </style:style>
    <style:style style:name="p16" style:family="paragraph">
      <style:paragraph-properties/>
    </style:style>
    <style:style style:name="p19" style:family="paragraph">
      <style:paragraph-properties/>
    </style:style>
    <text:list-style style:name="L18">
      <text:list-level-style-bullet text:bullet-char="●" text:level="4">
        <style:list-level-properties fo:text-align="start" text:space-before="32mm"/>
      </text:list-level-style-bullet>
    </text:list-style>
    <style:style style:name="p21" style:family="paragraph">
      <style:paragraph-properties fo:margin-top="13.5pt" fo:margin-bottom="9pt"/>
    </style:style>
    <style:style style:name="c20" style:family="text">
      <style:text-properties fo:font-family="monospace" style:text-underline-type="single" style:text-underline-style="solid" fo:color="#0000ff"/>
    </style:style>
    <style:style style:name="c23" style:family="text">
      <style:text-properties fo:font-weight="bold" fo:font-family="Sans" style:text-underline-type="single" style:text-underline-style="solid" fo:color="#0000ff"/>
    </style:style>
    <style:style style:name="c22" style:family="text">
      <style:text-properties fo:font-weight="bold" fo:font-family="Sans"/>
    </style:style>
    <style:style style:name="c40" style:family="text">
      <style:text-properties fo:font-weight="bold" fo:font-family="monospace"/>
    </style:style>
    <style:style style:name="c43" style:family="text">
      <style:text-properties fo:font-family="monospace" style:text-underline-type="single" style:text-underline-style="solid" fo:color="#ff00ff"/>
    </style:style>
    <style:style style:name="p42" style:family="paragraph">
      <style:paragraph-properties fo:margin-top="9pt" fo:margin-bottom="9pt"/>
    </style:style>
    <style:style style:name="p45" style:family="paragraph">
      <style:paragraph-properties fo:margin-top="9pt"/>
    </style:style>
    <style:style style:name="p44" style:family="paragraph">
      <style:paragraph-properties/>
    </style:style>
    <style:style style:name="c47" style:family="text">
      <style:text-properties fo:font-family="monospace" style:text-underline-type="single" style:text-underline-style="solid" fo:color="#ff00ff"/>
    </style:style>
    <style:style style:name="c46" style:family="text">
      <style:text-properties fo:font-family="monospace" style:text-underline-type="single" style:text-underline-style="solid" fo:color="#ff00ff"/>
    </style:style>
    <style:style style:name="p33" style:family="paragraph">
      <style:paragraph-properties fo:margin-top="9pt"/>
    </style:style>
    <style:style style:name="p32" style:family="paragraph">
      <style:paragraph-properties/>
    </style:style>
    <style:style style:name="p34" style:family="paragraph">
      <style:paragraph-properties fo:margin-bottom="9pt"/>
    </style:style>
    <style:style style:name="p36" style:family="paragraph">
      <style:paragraph-properties fo:margin-top="9pt" fo:margin-bottom="9pt"/>
    </style:style>
    <style:style style:name="p39" style:family="paragraph">
      <style:paragraph-properties fo:margin-bottom="9pt"/>
    </style:style>
    <style:style style:name="p38" style:family="paragraph">
      <style:paragraph-properties fo:margin-top="9pt"/>
    </style:style>
    <style:style style:name="c57" style:family="text">
      <style:text-properties fo:font-family="Sans" style:text-underline-type="single" style:text-underline-style="solid" fo:color="#0000ff"/>
    </style:style>
    <style:style style:name="c56" style:family="text">
      <style:text-properties fo:font-family="monospace" style:text-underline-type="single" style:text-underline-style="solid" fo:color="#ff00ff"/>
    </style:style>
    <style:style style:name="p59" style:family="paragraph">
      <style:paragraph-properties fo:margin-top="9pt" fo:margin-bottom="9pt" fo:margin-left="30pt" fo:margin-right="30pt"/>
    </style:style>
    <style:style style:name="c58" style:family="text">
      <style:text-properties fo:font-family="Sans" style:text-underline-type="single" style:text-underline-style="solid" fo:color="#0000ff"/>
    </style:style>
    <style:style style:name="c61" style:family="text">
      <style:text-properties fo:font-family="Sans" style:text-underline-type="single" style:text-underline-style="solid" fo:color="#0000ff"/>
    </style:style>
    <style:style style:name="c60" style:family="text">
      <style:text-properties fo:font-family="Sans" style:text-underline-type="single" style:text-underline-style="solid" fo:color="#0000ff"/>
    </style:style>
    <style:style style:name="c49" style:family="text">
      <style:text-properties fo:font-family="monospace" style:text-underline-type="single" style:text-underline-style="solid" fo:color="#ff00ff"/>
    </style:style>
    <style:style style:name="c48" style:family="text">
      <style:text-properties fo:font-family="monospace" style:text-underline-type="single" style:text-underline-style="solid" fo:color="#ff00ff"/>
    </style:style>
    <style:style style:name="c51" style:family="text">
      <style:text-properties fo:font-family="monospace" style:text-underline-type="single" style:text-underline-style="solid" fo:color="#ff00ff"/>
    </style:style>
    <style:style style:name="c50" style:family="text">
      <style:text-properties fo:font-family="monospace" style:text-underline-type="single" style:text-underline-style="solid" fo:color="#ff00ff"/>
    </style:style>
    <style:style style:name="p53" style:family="paragraph">
      <style:paragraph-properties fo:margin-bottom="9pt"/>
    </style:style>
    <style:style style:name="c52" style:family="text">
      <style:text-properties fo:font-family="monospace" style:text-underline-type="single" style:text-underline-style="solid" fo:color="#ff00ff"/>
    </style:style>
    <style:style style:name="p55" style:family="paragraph">
      <style:paragraph-properties fo:margin-top="9pt" fo:margin-bottom="9pt" fo:margin-left="30pt" fo:margin-right="30pt"/>
    </style:style>
    <style:style style:name="c54" style:family="text">
      <style:text-properties fo:font-family="monospace" style:text-underline-type="single" style:text-underline-style="solid" fo:color="#ff00ff"/>
    </style:style>
    <text:list-style style:name="L8">
      <text:list-level-style-bullet text:bullet-char="●" text:level="1">
        <style:list-level-properties fo:text-align="start" text:space-before="8mm"/>
      </text:list-level-style-bullet>
    </text:list-style>
    <style:style style:name="c11" style:family="text">
      <style:text-properties fo:font-family="monospace" style:text-underline-type="single" style:text-underline-style="solid" fo:color="#0000ff"/>
    </style:style>
    <style:style style:name="p10" style:family="paragraph">
      <style:paragraph-properties fo:margin-top="9pt" fo:margin-bottom="9pt"/>
    </style:style>
    <style:style style:name="p13" style:family="paragraph">
      <style:paragraph-properties/>
    </style:style>
    <text:list-style style:name="L12">
      <text:list-level-style-bullet text:bullet-char="●" text:level="2">
        <style:list-level-properties fo:text-align="start" text:space-before="16mm"/>
      </text:list-level-style-bullet>
    </text:list-style>
    <text:list-style style:name="L15">
      <text:list-level-style-bullet text:bullet-char="●" text:level="3">
        <style:list-level-properties fo:text-align="start" text:space-before="24mm"/>
      </text:list-level-style-bullet>
    </text:list-style>
  </office:automatic-styles>
  <office:body>
    <office:text>
      <text:p text:style-name="p3"/>
      <text:p text:style-name="p4"><text:span text:style-name="c5">Featured Demo ~ Kurt's Swimmer</text:span></text:p>
      <text:p text:style-name="p3"/>
      <text:list text:style-name="L8">
        <text:list-item>
          <text:p text:style-name="p10">
            <text:a xlink:href="http://dave-tower/demo/"><text:span text:style-name="c11">Tower Demos</text:span></text:a></text:p>
        </text:list-item>
        <text:list-item>
          <text:list text:style-name="L12">
            <text:list-item>
              <text:p text:style-name="p13">
                <text:a xlink:href="http://dave-tower/demo/web/"><text:span text:style-name="c14">Web Demos</text:span></text:a></text:p>
            </text:list-item>
            <text:list-item>
              <text:list text:style-name="L15">
                <text:list-item>
                  <text:p text:style-name="p16">
                    <text:a xlink:href="http://dave-tower/demo/web/claude/"><text:span text:style-name="c17">Claude Demos</text:span></text:a></text:p>
                </text:list-item>
                <text:list-item>
                  <text:list text:style-name="L18">
                    <text:list-item>
                      <text:p text:style-name="p19">
                        <text:a xlink:href="http://dave-tower/demo/web/claude/simple-swimmer.html"><text:span text:style-name="c20">Quiverbloom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21">
        <text:a xlink:href="http://dave-tower/demo/demo-checklist.html"><text:span text:style-name="c23">Demo </text:span></text:a>
        <text:a xlink:href="http://dave-tower/demo/demo-checklist.html"><text:span text:style-name="c24">✅</text:span></text:a>
        <text:a xlink:href="http://dave-tower/demo/demo-checklist.html"><text:span text:style-name="c23"> Checklists</text:span></text:a></text:p>
      <text:p text:style-name="p3"/>
      <text:p text:style-name="p25"><text:span text:style-name="c27">🥁</text:span><text:span text:style-name="c26"> Basic Editions</text:span></text:p>
      <text:p text:style-name="p4"><text:span text:style-name="c28">🥁</text:span><text:span text:style-name="c5"> Basic </text:span><text:span text:style-name="c28">🃏</text:span><text:span text:style-name="c5"> Icons </text:span><text:span text:style-name="c28">❔</text:span><text:span text:style-name="c5"> Pending</text:span></text:p>
      <text:list text:style-name="L8">
        <text:list-item>
          <text:p text:style-name="p30"><text:span text:style-name="c7">[❔] 🥁 apple</text:span></text:p>
        </text:list-item>
        <text:list-item>
          <text:p text:style-name="p29"><text:span text:style-name="c7">[❔] 🥁 atari</text:span></text:p>
        </text:list-item>
        <text:list-item>
          <text:p text:style-name="p29"><text:span text:style-name="c7">[❔] 🥁 baby</text:span></text:p>
        </text:list-item>
        <text:list-item>
          <text:p text:style-name="p29"><text:span text:style-name="c7">[❔] 🥁 c64</text:span></text:p>
        </text:list-item>
        <text:list-item>
          <text:p text:style-name="p29"><text:span text:style-name="c7">[❔] 🥁 classic</text:span></text:p>
        </text:list-item>
        <text:list-item>
          <text:p text:style-name="p29"><text:span text:style-name="c7">[❔] 🥁 gw-basic</text:span></text:p>
        </text:list-item>
        <text:list-item>
          <text:p text:style-name="p29"><text:span text:style-name="c7">[❔] 🥁 qbjs</text:span></text:p>
        </text:list-item>
        <text:list-item>
          <text:p text:style-name="p31"><text:span text:style-name="c7">[❔] 🥁 vintage</text:span></text:p>
        </text:list-item>
      </text:list>
      <text:p text:style-name="p4"><text:span text:style-name="c28">🥁</text:span><text:span text:style-name="c5"> Basic </text:span><text:span text:style-name="c28">🃏</text:span><text:span text:style-name="c5"> Icons </text:span><text:span text:style-name="c28">✅</text:span><text:span text:style-name="c5"> Complete</text:span></text:p>
      <text:list text:style-name="L8">
        <text:list-item>
          <text:p text:style-name="p33"><text:span text:style-name="c7">[✅] 🥁 fusion</text:span></text:p>
        </text:list-item>
        <text:list-item>
          <text:p text:style-name="p32"><text:span text:style-name="c7">[✅] 🥁 pc-basic</text:span></text:p>
        </text:list-item>
        <text:list-item>
          <text:p text:style-name="p32"><text:span text:style-name="c7">[✅] 🥁 qb</text:span></text:p>
        </text:list-item>
        <text:list-item>
          <text:p text:style-name="p32"><text:span text:style-name="c7">[✅] 🥁 qb64</text:span></text:p>
        </text:list-item>
        <text:list-item>
          <text:p text:style-name="p32"><text:span text:style-name="c7">[✅] 🥁 qb64pe</text:span></text:p>
        </text:list-item>
        <text:list-item>
          <text:p text:style-name="p32"><text:span text:style-name="c7">[✅] 🥁 spectrum</text:span></text:p>
        </text:list-item>
        <text:list-item>
          <text:p text:style-name="p32"><text:span text:style-name="c7">[✅] 🥁 ti-99</text:span></text:p>
        </text:list-item>
        <text:list-item>
          <text:p text:style-name="p32"><text:span text:style-name="c7">[✅] 🥁 trs-80</text:span></text:p>
        </text:list-item>
        <text:list-item>
          <text:p text:style-name="p32"><text:span text:style-name="c7">[✅] 🥁 vb</text:span></text:p>
        </text:list-item>
        <text:list-item>
          <text:p text:style-name="p32"><text:span text:style-name="c7">[✅] 🥁 webqb</text:span></text:p>
        </text:list-item>
        <text:list-item>
          <text:p text:style-name="p34"><text:span text:style-name="c7">[✅] 🥁 zx</text:span></text:p>
        </text:list-item>
      </text:list>
      <text:p text:style-name="p3"/>
      <text:p text:style-name="p25"><text:span text:style-name="c27">🌐</text:span><text:span text:style-name="c26"> Web Projects</text:span></text:p>
      <text:list text:style-name="L8">
        <text:list-item>
          <text:p text:style-name="p36"><text:span text:style-name="c7">[✅] 🌐 web</text:span></text:p>
        </text:list-item>
      </text:list>
      <text:p text:style-name="p3"/>
      <text:p text:style-name="p25"><text:span text:style-name="c27">❇️</text:span><text:span text:style-name="c26"> Support Folders</text:span></text:p>
      <text:list text:style-name="L8">
        <text:list-item>
          <text:p text:style-name="p38"><text:span text:style-name="c7">[✅] 🃏 icons</text:span></text:p>
        </text:list-item>
        <text:list-item>
          <text:p text:style-name="p39"><text:span text:style-name="c7">[✅] 🎨 style</text:span></text:p>
        </text:list-item>
      </text:list>
      <text:p text:style-name="p3"/>
      <text:p text:style-name="p21"><text:span text:style-name="c40">🎨</text:span><text:span text:style-name="c22"> Stylesheets To </text:span><text:span text:style-name="c40">📥</text:span><text:span text:style-name="c22"> Download</text:span></text:p>
      <text:p text:style-name="p25"><text:span text:style-name="c27">📥</text:span><text:span text:style-name="c26"> Download </text:span><text:span text:style-name="c27">❔</text:span><text:span text:style-name="c26"> Pending</text:span></text:p>
      <text:list text:style-name="L8">
        <text:list-item>
          <text:p text:style-name="p42"><text:span text:style-name="c7">[❔] ~ </text:span><text:a xlink:href="http://dave-legacy/jefr/style/just/active-header.css"><text:span text:style-name="c43">active-header.css</text:span></text:a><text:span text:style-name="c7"> ~ Jefr Version</text:span></text:p>
        </text:list-item>
      </text:list>
      <text:p text:style-name="p25"><text:span text:style-name="c27">📥</text:span><text:span text:style-name="c26"> Download </text:span><text:span text:style-name="c27">✅</text:span><text:span text:style-name="c26"> Complete</text:span></text:p>
      <text:list text:style-name="L8">
        <text:list-item>
          <text:p text:style-name="p45"><text:span text:style-name="c7">[✅] ~ </text:span><text:a xlink:href="http://dave-legacy/rt/style/plain.css"><text:span text:style-name="c46">plain.css</text:span></text:a><text:span text:style-name="c7"> ~ ReText Version</text:span></text:p>
        </text:list-item>
        <text:list-item>
          <text:p text:style-name="p44"><text:span text:style-name="c7">[✅] ~ </text:span><text:a xlink:href="http://dave-legacy/~/style/every-page.css"><text:span text:style-name="c47">every-page.css</text:span></text:a><text:span text:style-name="c7"> ~ Tilly Version</text:span></text:p>
        </text:list-item>
        <text:list-item>
          <text:p text:style-name="p44"><text:span text:style-name="c7">[✅] ~ </text:span><text:a xlink:href="http://dave-legacy/~/style/every-page-todo.css"><text:span text:style-name="c48">every-page-todo.css</text:span></text:a><text:span text:style-name="c7"> ~ Tilly Version</text:span></text:p>
        </text:list-item>
        <text:list-item>
          <text:p text:style-name="p44"><text:span text:style-name="c7">[✅] ~ </text:span><text:a xlink:href="http://dave-legacy/jefr/style/every-page.css"><text:span text:style-name="c49">every-page.css</text:span></text:a><text:span text:style-name="c7"> ~ Jefr Version</text:span></text:p>
        </text:list-item>
        <text:list-item>
          <text:p text:style-name="p44"><text:span text:style-name="c7">[✅] ~ </text:span><text:a xlink:href="http://dave-legacy/jefr/style/just/rainbow.css"><text:span text:style-name="c50">rainbow.css</text:span></text:a><text:span text:style-name="c7"> ~ Jefr Version</text:span></text:p>
        </text:list-item>
        <text:list-item>
          <text:p text:style-name="p44"><text:span text:style-name="c7">[✅] ~ </text:span><text:a xlink:href="http://dave-omega/app/jarvis/style/every-page.css"><text:span text:style-name="c51">every-page.css</text:span></text:a><text:span text:style-name="c7"> ~ Jarvis Version</text:span></text:p>
        </text:list-item>
        <text:list-item>
          <text:p text:style-name="p44"><text:span text:style-name="c7">[✅] ~ </text:span><text:a xlink:href="http://dave-omega/app/jarvis/style/plain.css"><text:span text:style-name="c52">plain.css</text:span></text:a><text:span text:style-name="c7"> ~ Jarvis Version</text:span></text:p>
        </text:list-item>
        <text:list-item>
          <text:p text:style-name="p53"><text:span text:style-name="c7">[✅] ~ </text:span><text:a xlink:href="http://dave-legacy/~/style/font/noto-mono.css"><text:span text:style-name="c54">noto-mono.css</text:span></text:a></text:p>
        </text:list-item>
      </text:list>
      <text:p text:style-name="p3"/>
      <text:p text:style-name="p21"><text:span text:style-name="c40">🗃️</text:span><text:span text:style-name="c22"> Workspaces</text:span></text:p>
      <text:p text:style-name="p25"><text:span text:style-name="c27">🥁</text:span><text:span text:style-name="c26"> Basic</text:span></text:p>
      <text:p text:style-name="p55">
        <text:a xlink:href="./"><text:span text:style-name="c56">🗃️ apple</text:span></text:a><text:span text:style-name="c0"> </text:span><text:a xlink:href="./"><text:span text:style-name="c56">🗃️ atari</text:span></text:a><text:span text:style-name="c0"> </text:span><text:a xlink:href="./"><text:span text:style-name="c56">🗃️ baby</text:span></text:a><text:span text:style-name="c0"> </text:span><text:a xlink:href="./"><text:span text:style-name="c56">🗃️ c64</text:span></text:a><text:span text:style-name="c0"> </text:span><text:a xlink:href="./"><text:span text:style-name="c56">🗃️ classic</text:span></text:a></text:p>
      <text:p text:style-name="p3"/>
      <text:p text:style-name="p55">
        <text:a xlink:href="./"><text:span text:style-name="c56">🗃️ fusion</text:span></text:a><text:span text:style-name="c0"> </text:span><text:a xlink:href="./"><text:span text:style-name="c56">🗃️ gw-basic</text:span></text:a><text:span text:style-name="c0"> </text:span><text:a xlink:href="./"><text:span text:style-name="c56">🗃️ pc-basic</text:span></text:a><text:span text:style-name="c0"> </text:span><text:a xlink:href="./"><text:span text:style-name="c56">🗃️ qb</text:span></text:a><text:span text:style-name="c0"> </text:span><text:a xlink:href="./"><text:span text:style-name="c56">🗃️ qb64</text:span></text:a></text:p>
      <text:p text:style-name="p3"/>
      <text:p text:style-name="p55">
        <text:a xlink:href="./"><text:span text:style-name="c56">🗃️ qb64pe</text:span></text:a><text:span text:style-name="c0"> </text:span><text:a xlink:href="./"><text:span text:style-name="c56">🗃️ qbjs</text:span></text:a><text:span text:style-name="c0"> </text:span><text:a xlink:href="./"><text:span text:style-name="c56">🗃️ spectrum</text:span></text:a><text:span text:style-name="c0"> </text:span><text:a xlink:href="./"><text:span text:style-name="c56">🗃️ ti-99</text:span></text:a><text:span text:style-name="c0"> </text:span><text:a xlink:href="./"><text:span text:style-name="c56">🗃️ trs-80</text:span></text:a></text:p>
      <text:p text:style-name="p3"/>
      <text:p text:style-name="p55">
        <text:a xlink:href="./"><text:span text:style-name="c56">🗃️ vb</text:span></text:a><text:span text:style-name="c0"> </text:span><text:a xlink:href="./"><text:span text:style-name="c56">🗃️ vintage</text:span></text:a><text:span text:style-name="c0"> </text:span><text:a xlink:href="./"><text:span text:style-name="c56">🗃️ webqb</text:span></text:a><text:span text:style-name="c0"> </text:span><text:a xlink:href="./"><text:span text:style-name="c56">🗃️ zx</text:span></text:a></text:p>
      <text:p text:style-name="p3"/>
      <text:p text:style-name="p25"><text:span text:style-name="c27">🌐</text:span><text:span text:style-name="c26"> Web</text:span></text:p>
      <text:p text:style-name="p55">
        <text:a xlink:href="./"><text:span text:style-name="c56">🗃️ web</text:span></text:a></text:p>
      <text:p text:style-name="p3"/>
      <text:p text:style-name="p25"><text:span text:style-name="c27">❇️</text:span><text:span text:style-name="c26"> Support</text:span></text:p>
      <text:p text:style-name="p55">
        <text:a xlink:href="./"><text:span text:style-name="c56">🗃️ icons</text:span></text:a><text:span text:style-name="c0"> </text:span><text:a xlink:href="./"><text:span text:style-name="c56">🗃️ style</text:span></text:a></text:p>
      <text:p text:style-name="p3"/>
      <text:p text:style-name="p25"><text:span text:style-name="c26">Navigation</text:span></text:p>
      <text:p text:style-name="p55">
        <text:a xlink:href="./web/web-menu.html"><text:span text:style-name="c57">Web Menu</text:span></text:a><text:span text:style-name="c0"> </text:span><text:a xlink:href="./demo-clone-repo.html"><text:span text:style-name="c58">Clone Repo</text:span></text:a></text:p>
      <text:p text:style-name="p59">
        <text:a xlink:href="./tree.php"><text:span text:style-name="c60">Folder Tree</text:span></text:a><text:span text:style-name="c0"> </text:span><text:a xlink:href="./"><text:span text:style-name="c61">File System</text:span></text:a></text:p>
      <text:p text:style-name="p3"/>
    </office:text>
  </office:body>
</office:document-content>
</file>